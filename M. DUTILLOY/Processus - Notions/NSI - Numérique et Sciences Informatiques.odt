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70000013DD86C664008AF4E52.png" manifest:media-type="image/png"/>
  <manifest:file-entry manifest:full-path="Pictures/10000000000005A00000031BB2ECD197BC173E8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paragraph-rsid="0005ba0a"/>
    </style:style>
    <style:style style:name="P2" style:family="paragraph" style:parent-style-name="Standard">
      <style:text-properties officeooo:rsid="0005ba0a" officeooo:paragraph-rsid="0005ba0a"/>
    </style:style>
    <style:style style:name="P3" style:family="paragraph" style:parent-style-name="Standard">
      <style:text-properties officeooo:rsid="00069c9f" officeooo:paragraph-rsid="00069c9f"/>
    </style:style>
    <style:style style:name="P4" style:family="paragraph" style:parent-style-name="Standard">
      <style:text-properties officeooo:rsid="00072e5c" officeooo:paragraph-rsid="00072e5c"/>
    </style:style>
    <style:style style:name="P5" style:family="paragraph" style:parent-style-name="Standard">
      <style:text-properties officeooo:rsid="000c2694" officeooo:paragraph-rsid="000c2694"/>
    </style:style>
    <style:style style:name="P6" style:family="paragraph" style:parent-style-name="Standard">
      <style:text-properties officeooo:rsid="00103ba3" officeooo:paragraph-rsid="00103ba3"/>
    </style:style>
    <style:style style:name="P7" style:family="paragraph" style:parent-style-name="Standard">
      <style:text-properties officeooo:rsid="00151f8f" officeooo:paragraph-rsid="00151f8f"/>
    </style:style>
    <style:style style:name="P8" style:family="paragraph" style:parent-style-name="Standard">
      <style:text-properties officeooo:rsid="00151f8f" officeooo:paragraph-rsid="00151f8f"/>
    </style:style>
    <style:style style:name="P9" style:family="paragraph" style:parent-style-name="Standard">
      <style:text-properties officeooo:rsid="0017b4e6" officeooo:paragraph-rsid="0017b4e6"/>
    </style:style>
    <style:style style:name="T1" style:family="text">
      <style:text-properties officeooo:rsid="0011037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à faire vous même 1 :</text:p>
      <text:p text:style-name="P2"/>
      <text:p text:style-name="P2">Le PID de getty est de 2 et le PPID est de 1.</text:p>
      <text:p text:style-name="P2"><draw:frame draw:style-name="fr2" draw:name="Image1" text:anchor-type="char" svg:x="1.238cm" svg:y="0.228cm" svg:width="4.66cm" svg:height="6.87cm" draw:z-index="0"><draw:image xlink:href="Pictures/10000000000000D70000013DD86C664008AF4E5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à faire vous même 2 :</text:p>
      <text:p text:style-name="P2"><draw:frame draw:style-name="fr1" draw:name="Image2" text:anchor-type="char" svg:width="17cm" svg:height="9.384cm" draw:z-index="1"><draw:image xlink:href="Pictures/10000000000005A00000031BB2ECD197BC173E84.png" xlink:type="simple" xlink:show="embed" xlink:actuate="onLoad" loext:mime-type="image/png"/></draw:frame></text:p>
      <text:p text:style-name="P2"/>
      <text:p text:style-name="P3">1978 – 2016 – 2050 – 2090 – 2366</text:p>
      <text:p text:style-name="P3"/>
      <text:p text:style-name="P3">AFVM 3 :</text:p>
      <text:p text:style-name="P4">le premier processus est «  root <text:s text:c="8"/>1 <text:s text:c="4"/>0 <text:s/>0 08:25 ? <text:s text:c="7"/>00:00:00 /sbin/init »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5">exercice 1 : </text:p>
      <text:p text:style-name="P5"/>
      <text:p text:style-name="P6">Q5 : Si python programme2.py n’a pas un temps d’exécution trop long et n’est bloqué par une demande de ressource alors <text:span text:style-name="T1">il pourrait se terminer <text:s/>en premier car il est dans l’état élu. Sinon il n’est pas possible de prédire l’ordre de fin.</text:span> </text:p>
      <text:p text:style-name="P6"/>
      <text:p text:style-name="P7">Exercice 2 :</text:p>
      <text:p text:style-name="P7"/>
      <text:p text:style-name="P9">exercice 3 :</text:p>
      <text:p text:style-name="P9"/>
      <text:p text:style-name="P9">exercice 4 :</text:p>
      <text:p text:style-name="P9"/>
      <text:p text:style-name="P9">partie B</text:p>
      <text:p text:style-name="P9">1. ps -ef</text:p>
      <text:p text:style-name="P9">2. l’identifiant du processus ppid est de 831</text:p>
      <text:p text:style-name="P9">3. le processus le plus long est le 621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5ba0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SI - Numérique et Sciences Informatiques </text:p>
        <text:p text:style-name="MP1">Th4Ch5 - TD1 - Les processus 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6-03-16T08:55:02.519000000</meta:creation-date>
    <dc:date>2026-03-30T08:24:47</dc:date>
    <meta:editing-duration>PT1H42M7S</meta:editing-duration>
    <meta:editing-cycles>5</meta:editing-cycles>
    <meta:generator>LibreOffice/6.4.5.2$Windows_X86_64 LibreOffice_project/a726b36747cf2001e06b58ad5db1aa3a9a1872d6</meta:generator>
    <meta:document-statistic meta:table-count="0" meta:image-count="2" meta:object-count="0" meta:page-count="2" meta:paragraph-count="17" meta:word-count="136" meta:character-count="675" meta:non-whitespace-character-count="526"/>
  </office:meta>
</office:document-meta>
</file>